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61in"/>
    </style:style>
    <style:style style:name="co3" style:family="table-column">
      <style:table-column-properties fo:break-before="auto" style:column-width="1.2118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1173in"/>
    </style:style>
    <style:style style:name="co10" style:family="table-column">
      <style:table-column-properties fo:break-before="auto" style:column-width="1.7618in"/>
    </style:style>
    <style:style style:name="co11" style:family="table-column">
      <style:table-column-properties fo:break-before="auto" style:column-width="0.2681in"/>
    </style:style>
    <style:style style:name="co12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3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battery capacity, mAh</text:p>
          </table:table-cell>
          <table:table-cell office:value-type="string" calcext:value-type="string">
            <text:p>battery voltage, V</text:p>
          </table:table-cell>
          <table:table-cell table:number-columns-repeated="2"/>
          <table:table-cell office:value-type="string" calcext:value-type="string">
            <text:p>battery, mWh (calc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table:formula="of:=[.C3]*[.B3]" office:value-type="float" office:value="11840" calcext:value-type="float">
            <text:p>118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«x» preventing autoformatt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ime (input)</text:p>
          </table:table-cell>
          <table:table-cell office:value-type="string" calcext:value-type="string">
            <text:p>mAh (input)</text:p>
          </table:table-cell>
          <table:table-cell office:value-type="string" calcext:value-type="string">
            <text:p>mWh (input)</text:p>
          </table:table-cell>
          <table:table-cell/>
          <table:table-cell office:value-type="string" calcext:value-type="string">
            <text:p>mean input V (calc)</text:p>
          </table:table-cell>
          <table:table-cell/>
          <table:table-cell office:value-type="string" calcext:value-type="string">
            <text:p>T in Hours</text:p>
          </table:table-cell>
          <table:table-cell office:value-type="string" calcext:value-type="string">
            <text:p>mean mAh</text:p>
          </table:table-cell>
          <table:table-cell office:value-type="string" calcext:value-type="string">
            <text:p>mean mWh</text:p>
          </table:table-cell>
          <table:table-cell/>
          <table:table-cell office:value-type="string" calcext:value-type="string">
            <text:p>estimated work time, day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2:57:30 x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ROUND([.D6]/[.C6]; 2)" office:value-type="float" office:value="5.22" calcext:value-type="float">
            <text:p>5.22</text:p>
          </table:table-cell>
          <table:table-cell/>
          <table:table-cell table:formula="of:=ROUND(VALUE(MID([.B6];1;2)) + VALUE(MID([.B6];4;2))/60 + VALUE(MID([.B6];7;2))/3600; 6)" office:value-type="float" office:value="12.958333" calcext:value-type="float">
            <text:p>12.958333</text:p>
          </table:table-cell>
          <table:table-cell table:formula="of:=ROUND([.C6]/[.H6]; 6)" office:value-type="float" office:value="0.694534" calcext:value-type="float">
            <text:p>0.694534</text:p>
          </table:table-cell>
          <table:table-cell table:formula="of:=ROUND([.D6]/[.H6]; 6)" office:value-type="float" office:value="3.62701" calcext:value-type="float">
            <text:p>3.62701</text:p>
          </table:table-cell>
          <table:table-cell/>
          <table:table-cell table:formula="of:=ROUND([.$F$3]/[.J6]/24; 3)" office:value-type="float" office:value="136.017" calcext:value-type="float">
            <text:p>136.01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21:09:42 x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ROUND([.D7]/[.C7]; 2)" office:value-type="float" office:value="5.13" calcext:value-type="float">
            <text:p>5.13</text:p>
          </table:table-cell>
          <table:table-cell/>
          <table:table-cell table:formula="of:=ROUND(VALUE(MID([.B7];1;2)) + VALUE(MID([.B7];4;2))/60 + VALUE(MID([.B7];7;2))/3600; 6)" office:value-type="float" office:value="21.161667" calcext:value-type="float">
            <text:p>21.161667</text:p>
          </table:table-cell>
          <table:table-cell table:formula="of:=ROUND([.C7]/[.H7]; 6)" office:value-type="float" office:value="0.708829" calcext:value-type="float">
            <text:p>0.708829</text:p>
          </table:table-cell>
          <table:table-cell table:formula="of:=ROUND([.D7]/[.H7]; 6)" office:value-type="float" office:value="3.638655" calcext:value-type="float">
            <text:p>3.638655</text:p>
          </table:table-cell>
          <table:table-cell/>
          <table:table-cell table:formula="of:=ROUND([.$F$3]/[.J7]/24; 3)" office:value-type="float" office:value="135.581" calcext:value-type="float">
            <text:p>135.5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24:03:30 x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ROUND([.D8]/[.C8]; 2)" office:value-type="float" office:value="5.12" calcext:value-type="float">
            <text:p>5.12</text:p>
          </table:table-cell>
          <table:table-cell/>
          <table:table-cell table:formula="of:=ROUND(VALUE(MID([.B8];1;2)) + VALUE(MID([.B8];4;2))/60 + VALUE(MID([.B8];7;2))/3600; 6)" office:value-type="float" office:value="24.058333" calcext:value-type="float">
            <text:p>24.058333</text:p>
          </table:table-cell>
          <table:table-cell table:formula="of:=ROUND([.C8]/[.H8]; 6)" office:value-type="float" office:value="0.706616" calcext:value-type="float">
            <text:p>0.706616</text:p>
          </table:table-cell>
          <table:table-cell table:formula="of:=ROUND([.D8]/[.H8]; 6)" office:value-type="float" office:value="3.616211" calcext:value-type="float">
            <text:p>3.616211</text:p>
          </table:table-cell>
          <table:table-cell/>
          <table:table-cell table:formula="of:=ROUND([.$F$3]/[.J8]/24; 3)" office:value-type="float" office:value="136.423" calcext:value-type="float">
            <text:p>136.4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20:01:17.841665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08:54:14.235631154</meta:creation-date>
    <dc:date>2026-06-30T20:14:47.380009661</dc:date>
    <meta:editing-duration>PT26M31S</meta:editing-duration>
    <meta:editing-cycles>3</meta:editing-cycles>
    <meta:generator>LibreOffice/25.8.7.3$Linux_X86_64 LibreOffice_project/580$Build-3</meta:generator>
    <meta:document-statistic meta:table-count="1" meta:cell-count="39" meta:object-count="0"/>
  </office:meta>
</office:document-meta>
</file>